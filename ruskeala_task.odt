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leStyle">РУСКЕАЛА</text:p>
      <text:p text:style-name="ParaStyle">Горный парк <text:span text:style-name="Bold">«Рускеала»</text:span> – туристический комплекс, расположенный в <text:span text:style-name="Italic">Сортавальском районе Республики Карелия</text:span>. Основой комплекса является объект культурного наследия, памятник истории – заполненный грунтовыми водами бывший мраморный карьер. <text:span text:style-name="Bold">«Рускеала»</text:span> стала первым на Северо-Западе России примером успешной коммерциализации объекта историко-культурного наследия.</text:p>
      <text:p text:style-name="ParaSpacingStyle">Парк расположен вблизи посёлка <text:span text:style-name="Italic">Рускеала</text:span> в 30 километрах к северу от <text:span text:style-name="Italic">Сортавалы</text:span>, на берегу реки <text:span text:style-name="Italic">Тохмайоки</text:span>. У парка находится тупиковая железнодорожная станция <text:span text:style-name="Underline">«Горный парк «Рускеала»»</text:span> линии Сортавала – Рускеала.</text:p>
      <table:table>
        <table:table-column/>
        <table:table-column/>
        <table:table-row>
          <table:table-cell table:number-columns-spanned="2">
            <text:p text:style-name="TableHeader">Характеристики</text:p>
          </table:table-cell>
        </table:table-row>
        <table:table-row>
          <table:table-cell>
            <text:p text:style-name="CellLeft">Протяжённость озера с севера на юг</text:p>
          </table:table-cell>
          <table:table-cell>
            <text:p text:style-name="CellCenterItalic">460 м</text:p>
          </table:table-cell>
        </table:table-row>
        <table:table-row>
          <table:table-cell>
            <text:p text:style-name="CellLeft">Ширина</text:p>
          </table:table-cell>
          <table:table-cell>
            <text:p text:style-name="CellCenterItalic">до 100 м</text:p>
          </table:table-cell>
        </table:table-row>
        <table:table-row>
          <table:table-cell>
            <text:p text:style-name="CellLeft">Расстояние от самой верхней точки борта карьера до его дна</text:p>
          </table:table-cell>
          <table:table-cell>
            <text:p text:style-name="CellCenterItalic">свыше 50 м</text:p>
          </table:table-cell>
        </table:table-row>
        <table:table-row>
          <table:table-cell>
            <text:p text:style-name="CellLeft">Прозрачность воды</text:p>
          </table:table-cell>
          <table:table-cell>
            <text:p text:style-name="CellCenterItalic">15–18 м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leStyle" style:family="paragraph" style:display-name="TitleStyle">
      <style:paragraph-properties fo:text-align="center" fo:margin-bottom="0.635cm"/>
      <style:text-properties fo:font-weight="bold" fo:font-size="14pt" fo:text-transform="uppercase"/>
    </style:style>
    <style:style style:name="ParaStyle" style:family="paragraph" style:display-name="ParaStyle">
      <style:paragraph-properties fo:text-align="justify" fo:margin-left="0cm" fo:margin-right="0cm" fo:text-indent="1cm" fo:margin-bottom="0cm" fo:line-height="120%"/>
      <style:text-properties fo:font-size="14pt"/>
    </style:style>
    <style:style style:name="ParaSpacingStyle" style:family="paragraph" style:display-name="ParaSpacingStyle">
      <style:paragraph-properties fo:text-align="justify" fo:text-indent="1cm" fo:margin-bottom="0.635cm" fo:line-height="120%"/>
      <style:text-properties fo:font-size="14pt"/>
    </style:style>
    <style:style style:name="TableStyle" style:family="table" style:display-name="TableStyle">
      <style:paragraph-properties fo:text-align="center"/>
    </style:style>
    <style:style style:name="CellLeft" style:family="paragraph" style:display-name="CellLeft">
      <style:paragraph-properties fo:text-align="left"/>
      <style:text-properties fo:font-size="14pt"/>
    </style:style>
    <style:style style:name="CellCenterItalic" style:family="paragraph" style:display-name="CellCenterItalic">
      <style:paragraph-properties fo:text-align="center"/>
      <style:text-properties fo:font-size="14pt" fo:font-style="italic"/>
    </style:style>
    <style:style style:name="TableHeader" style:family="paragraph" style:display-name="TableHeader">
      <style:paragraph-properties fo:text-align="center"/>
      <style:text-properties fo:font-size="14pt" fo:font-weight="bold" fo:font-style="italic"/>
    </style:style>
    <style:style style:name="Bold" style:family="text" style:display-name="Bold">
      <style:text-properties fo:font-weight="bold"/>
    </style:style>
    <style:style style:name="Italic" style:family="text" style:display-name="Italic">
      <style:text-properties fo:font-style="italic"/>
    </style:style>
    <style:style style:name="Underline" style:family="text" style:display-name="Underline">
      <style:text-properties style:text-underline-style="solid" style:text-underline-width="auto" style:text-underline-color="font-color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