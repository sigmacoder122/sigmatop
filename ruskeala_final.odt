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TableProp" style:family="table" style:display-name="TableProp">
      <style:table-properties table:align="center" style:width="12cm"/>
    </style:style>
    <style:style style:name="Col1" style:family="table-column" style:display-name="Col1">
      <style:table-column-properties style:column-width="8cm"/>
    </style:style>
    <style:style style:name="Col2" style:family="table-column" style:display-name="Col2">
      <style:table-column-properties style:column-width="4cm"/>
    </style:style>
  </office:automatic-styles>
  <office:body>
    <office:text>
      <text:p text:style-name="TitleStyle">РУСКЕАЛА</text:p>
      <text:p text:style-name="ParaStyle">Горный парк <text:span text:style-name="BoldS">«Рускеала»</text:span> – туристический комплекс, расположенный в <text:span text:style-name="ItalicS">Сортавальском районе Республики Карелия</text:span>. Основой комплекса является объект культурного наследия, памятник истории – заполненный грунтовыми водами бывший мраморный карьер. <text:span text:style-name="BoldS">«Рускеала»</text:span> стала первым на Северо-Западе России примером успешной коммерциализации объекта историко-культурного наследия.</text:p>
      <text:p text:style-name="ParaBeforeTable">Парк расположен вблизи посёлка <text:span text:style-name="ItalicS">Рускеала</text:span> в 30 километрах к северу от <text:span text:style-name="ItalicS">Сортавалы</text:span>, на берегу реки <text:span text:style-name="ItalicS">Тохмайоки</text:span>. У парка находится тупиковая железнодорожная станция <text:span text:style-name="UnderS">«Горный парк «Рускеала»»</text:span> линии Сортавала – Рускеала.</text:p>
      <table:table table:style-name="TableProp">
        <table:table-column table:style-name="Col1"/>
        <table:table-column table:style-name="Col2"/>
        <table:table-row>
          <table:table-cell table:number-columns-spanned="2">
            <text:p text:style-name="CellHeader">Характеристики</text:p>
          </table:table-cell>
        </table:table-row>
        <table:table-row>
          <table:table-cell>
            <text:p text:style-name="CellLeft">Протяжённость озера с севера на юг</text:p>
          </table:table-cell>
          <table:table-cell>
            <text:p text:style-name="CellCenterItalic">460 м</text:p>
          </table:table-cell>
        </table:table-row>
        <table:table-row>
          <table:table-cell>
            <text:p text:style-name="CellLeft">Ширина</text:p>
          </table:table-cell>
          <table:table-cell>
            <text:p text:style-name="CellCenterItalic">до 100 м</text:p>
          </table:table-cell>
        </table:table-row>
        <table:table-row>
          <table:table-cell>
            <text:p text:style-name="CellLeft">Расстояние от самой верхней точки борта карьера до его дна</text:p>
          </table:table-cell>
          <table:table-cell>
            <text:p text:style-name="CellCenterItalic">свыше 50 м</text:p>
          </table:table-cell>
        </table:table-row>
        <table:table-row>
          <table:table-cell>
            <text:p text:style-name="CellLeft">Прозрачность воды</text:p>
          </table:table-cell>
          <table:table-cell>
            <text:p text:style-name="CellCenterItalic">15–18 м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TitleStyle" style:family="paragraph" style:display-name="TitleStyle">
      <style:paragraph-properties fo:text-align="center" fo:margin-bottom="0.635cm"/>
      <style:text-properties fo:font-size="14pt" fo:font-weight="bold"/>
    </style:style>
    <style:style style:name="ParaStyle" style:family="paragraph" style:display-name="ParaStyle">
      <style:paragraph-properties fo:text-align="justify" fo:text-indent="1cm" fo:line-height="100%" fo:margin-bottom="0cm"/>
      <style:text-properties fo:font-size="14pt" fo:font-family="Times New Roman"/>
    </style:style>
    <style:style style:name="ParaBeforeTable" style:family="paragraph" style:display-name="ParaBeforeTable">
      <style:paragraph-properties fo:text-align="justify" fo:text-indent="1cm" fo:margin-bottom="0.635cm"/>
      <style:text-properties fo:font-size="14pt" fo:font-family="Times New Roman"/>
    </style:style>
    <style:style style:name="CellHeader" style:family="paragraph" style:display-name="CellHeader">
      <style:paragraph-properties fo:text-align="center"/>
      <style:text-properties fo:font-size="14pt" fo:font-weight="bold" fo:font-style="italic"/>
    </style:style>
    <style:style style:name="CellLeft" style:family="paragraph" style:display-name="CellLeft">
      <style:paragraph-properties fo:text-align="left"/>
      <style:text-properties fo:font-size="14pt"/>
    </style:style>
    <style:style style:name="CellCenterItalic" style:family="paragraph" style:display-name="CellCenterItalic">
      <style:paragraph-properties fo:text-align="center"/>
      <style:text-properties fo:font-size="14pt" fo:font-style="italic"/>
    </style:style>
    <style:style style:name="BoldS" style:family="text" style:display-name="BoldS">
      <style:text-properties fo:font-weight="bold"/>
    </style:style>
    <style:style style:name="ItalicS" style:family="text" style:display-name="ItalicS">
      <style:text-properties fo:font-style="italic"/>
    </style:style>
    <style:style style:name="UnderS" style:family="text" style:display-name="UnderS">
      <style:text-properties style:text-underline-style="solid" style:text-underline-width="auto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